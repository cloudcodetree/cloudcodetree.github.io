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c6ym8e4xhi10"/><text:span text:style-name="T1">CHRIS HARPER</text:span></text:p>
      <text:p text:style-name="Standard"><text:a xlink:type="simple" xlink:href="mailto:chris@cloudcodetree.com" text:style-name="ListLabel_20_1" text:visited-style-name="ListLabel_20_1"><text:span text:style-name="T2">chris@cloudcodetree.com</text:span></text:a> | 512-938-9697 | Austin Metropolitan Area | <text:a xlink:type="simple" xlink:href="http://cloudcodetree.com" text:style-name="ListLabel_20_1" text:visited-style-name="ListLabel_20_1"><text:span text:style-name="T2">cloudcodetree.com</text:span></text:a> | <text:a xlink:type="simple" xlink:href="http://linkedin.com/in/cloudcodetree/" text:style-name="ListLabel_20_1" text:visited-style-name="ListLabel_20_1"><text:span text:style-name="T2">linkedin.com/in/cloudcodetree/</text:span></text:a></text:p>
      <text:p text:style-name="P1"/>
      <text:p text:style-name="Standard"><text:span text:style-name="T1">Engineering Manager | Software Architecture | Cloud Solutions | AI/ML Integration</text:span></text:p>
      <text:p text:style-name="Heading_20_3"><text:bookmark text:name="_b8qpjiojaxz7"/><text:span text:style-name="T1">PROFESSIONAL SUMMARY</text:span></text:p>
      <text:p text:style-name="Standard">Principal Engineering Leader driving technical innovation and organizational excellence at enterprise scale. Proven success building high-performing engineering teams, architecting cloud-native solutions, and delivering transformational business outcomes. Expert in modern full-stack development, AI/ML integration, and distributed systems architecture. Strategic leader who bridges technical vision with business objectives while maintaining hands-on engineering contributions.</text:p>
      <text:p text:style-name="Heading_20_3"><text:bookmark text:name="_uo1nkjlmfe4f"/><text:span text:style-name="T1">CORE COMPETENCIES</text:span></text:p>
      <text:p text:style-name="Standard"><text:span text:style-name="T1">Technical Leadership:</text:span> Engineering Management • Software Development Life Cycle (SDLC) • Technical Strategy • System Architecture • Cross-functional Collaboration • Digital Transformation • Agile Methodologies</text:p>
      <text:p text:style-name="P1"/>
      <text:p text:style-name="Standard"><text:span text:style-name="T1">Programming &amp; Development:</text:span> Python • TypeScript • JavaScript • React • Node.js • RESTful APIs • API Development • Software Engineering Best Practices • Full-Stack Development</text:p>
      <text:p text:style-name="P1"/>
      <text:p text:style-name="Standard"><text:span text:style-name="T1">Cloud &amp; Infrastructure:</text:span> Amazon Web Services (AWS) • Microsoft Azure • Google Cloud Platform (GCP) • Docker • Kubernetes • Infrastructure as Code (IaC) • CI/CD Pipelines • DevOps</text:p>
      <text:p text:style-name="P1"/>
      <text:p text:style-name="Standard"><text:span text:style-name="T1">Emerging Technologies:</text:span> Artificial Intelligence (AI) • Machine Learning (ML) • LangChain • OpenAI API • AWS Bedrock • Large Language Models (LLMs) • Vector Databases</text:p>
      <text:p text:style-name="P1"/>
      <text:p text:style-name="Standard"><text:span text:style-name="T1">Data &amp; Architecture:</text:span> PostgreSQL • MongoDB • DynamoDB • Microservices Architecture • Event-Driven Architecture • Performance Optimization • Enterprise Architecture</text:p>
      <text:p text:style-name="Heading_20_3"><text:bookmark text:name="_709og835oeyy"/><text:span text:style-name="T1">RECENT TECHNICAL INITIATIVES</text:span></text:p>
      <text:p text:style-name="Standard"><text:span text:style-name="T1">AI/ML Integration:</text:span> Architected intelligent document processing systems using RAG patterns, OpenAI GPT-4, and vector databases, reducing manual processing time by 85%.</text:p>
      <text:p text:style-name="P1"/>
      <text:p text:style-name="Standard"><text:span text:style-name="T1">Cloud Modernization:</text:span> Led enterprise migration from monolithic systems to cloud-native microservices, achieving 99.9% uptime while reducing infrastructure costs by 40%.</text:p>
      <text:p text:style-name="P1"/>
      <text:p text:style-name="Standard"><text:span text:style-name="T1">Engineering Excellence:</text:span> Established organization-wide DevOps practices and automated testing frameworks, improving deployment frequency from weekly to daily releases.</text:p>
      <text:p text:style-name="Heading_20_3"><text:bookmark text:name="_u8iec5onz7dl"/><text:span text:style-name="T1">PROFESSIONAL EXPERIENCE</text:span></text:p>
      <text:p text:style-name="Standard"><text:span text:style-name="T1">Cloud Architecture Consultant (Contract) | ALSAC/St. Jude Children's Research Hospital</text:span><text:line-break/><text:span text:style-name="T3">May 2023 - August 2025</text:span></text:p>
      <text:p text:style-name="P1"/>
      <text:p text:style-name="Standard"><text:soft-page-break/>• <text:span text:style-name="T1">Strategic Impact:</text:span> Consulting on enterprise healthcare platform transformation, architecting solutions for 10M+ daily healthcare messages with HIPAA compliance requirements</text:p>
      <text:p text:style-name="P1"/>
      <text:p text:style-name="Standard">• <text:span text:style-name="T1">Technical Leadership:</text:span> Designed cloud-native microservices architecture using Python, AWS Lambda, ECS, and API Gateway, enabling real-time data processing at scale</text:p>
      <text:p text:style-name="P1"/>
      <text:p text:style-name="Standard">• <text:span text:style-name="T1">Infrastructure Modernization:</text:span> Implemented Infrastructure as Code practices across 15+ development teams, reducing environment provisioning time from days to minutes</text:p>
      <text:p text:style-name="P1"/>
      <text:p text:style-name="Standard">• <text:span text:style-name="T1">DevOps Excellence:</text:span> Established automated CI/CD pipelines with integrated security scanning and monitoring, improving deployment success rate to 99.5%</text:p>
      <text:p text:style-name="P1"/>
      <text:p text:style-name="Standard">• <text:span text:style-name="T1">Performance Optimization:</text:span> Achieved sub-100ms API response times while reducing AWS operational costs by 30% through strategic architecture decisions</text:p>
      <text:p text:style-name="P1"/>
      <text:p text:style-name="Standard"><text:span text:style-name="T1">Engineering Manager &amp; Technical Lead | Blue Sky Cloud Consulting</text:span><text:line-break/><text:span text:style-name="T3">Aug 2020 - Apr 2023</text:span></text:p>
      <text:p text:style-name="P1"/>
      <text:p text:style-name="Standard">• <text:span text:style-name="T1">Client Leadership:</text:span> Managed technical consulting engagements for Fortune 500 clients including GitKraken and Rivian, delivering complex full-stack solutions</text:p>
      <text:p text:style-name="P1"/>
      <text:p text:style-name="Standard">• <text:span text:style-name="T1">Product Development:</text:span> Architected enterprise SaaS platforms with real-time messaging, workflow automation, and analytics capabilities serving 10,000+ active users</text:p>
      <text:p text:style-name="P1"/>
      <text:p text:style-name="Standard">• <text:span text:style-name="T1">IoT &amp; Data Processing:</text:span> Built production-grade data processing systems for manufacturing IoT devices, handling real-time telemetry and predictive analytics</text:p>
      <text:p text:style-name="P1"/>
      <text:p text:style-name="Standard">• <text:span text:style-name="T1">Team Excellence:</text:span> Led technical hiring and mentorship programs, achieving 95% team retention and 80% internal promotion rate</text:p>
      <text:p text:style-name="P1"/>
      <text:p text:style-name="Standard">• <text:span text:style-name="T1">Modernization Success:</text:span> Implemented containerized microservices architecture, accelerating deployment cycles by 90% and improving system reliability</text:p>
      <text:p text:style-name="P1"/>
      <text:p text:style-name="Standard"><text:span text:style-name="T1">Senior Software Engineer &amp; Team Lead | Cerity</text:span><text:line-break/><text:span text:style-name="T3">Aug 2018 - Aug 2020</text:span></text:p>
      <text:p text:style-name="P1"/>
      <text:p text:style-name="Standard">• <text:span text:style-name="T1">Platform Architecture:</text:span> Led full-stack team building next-generation insurance platform using Angular, React, Python, and serverless AWS infrastructure</text:p>
      <text:p text:style-name="P1"/>
      <text:p text:style-name="Standard"><text:soft-page-break/>• <text:span text:style-name="T1">Scalability Achievement:</text:span> Designed serverless applications supporting 50,000+ concurrent users with auto-scaling Lambda functions and optimized database patterns</text:p>
      <text:p text:style-name="P1"/>
      <text:p text:style-name="Standard">• <text:span text:style-name="T1">Engineering Culture:</text:span> Introduced modern development practices including automated testing, code reviews, and continuous integration, improving code quality metrics by 60%</text:p>
      <text:p text:style-name="P1"/>
      <text:p text:style-name="Standard">• <text:span text:style-name="T1">Performance Excellence:</text:span> Implemented caching strategies, database optimizations, and CDN integration, resulting in 200% improvement in user engagement metrics</text:p>
      <text:p text:style-name="P1"/>
      <text:p text:style-name="Standard"><text:span text:style-name="T1">Lead Software Engineer | ThunderDork LLC</text:span><text:line-break/><text:span text:style-name="T3">May 2015 - Aug 2018</text:span></text:p>
      <text:p text:style-name="P1"/>
      <text:p text:style-name="Standard">• <text:span text:style-name="T1">Enterprise Client Delivery:</text:span> Led software development for Fortune 500 clients including Capital One, managing distributed teams and complex integration requirements</text:p>
      <text:p text:style-name="P1"/>
      <text:p text:style-name="Standard">• <text:span text:style-name="T1">Architecture Evolution:</text:span> Designed microservices migration strategy using Docker and AWS, improving system modularity and enabling independent team deployments</text:p>
      <text:p text:style-name="P1"/>
      <text:p text:style-name="Standard">• <text:span text:style-name="T1">Quality Engineering:</text:span> Established comprehensive testing frameworks and development standards, reducing production incidents by 40%</text:p>
      <text:p text:style-name="P1"/>
      <text:p text:style-name="Standard"><text:span text:style-name="T1">Senior Engineering Roles | Netspend • Cinsay • Schematic</text:span><text:line-break/><text:span text:style-name="T3">2008 - 2015</text:span></text:p>
      <text:p text:style-name="P1"/>
      <text:p text:style-name="Standard">Delivered high-impact solutions across fintech, ecommerce, and enterprise markets. Notable achievements include building scalable financial platforms serving millions of users, pioneering video-based shopping experiences, and creating award-winning interactive applications for Fortune 500 brands including Dell.</text:p>
      <text:p text:style-name="Heading_20_3"><text:bookmark text:name="_pom3bafrqo8u"/><text:span text:style-name="T1">EDUCATION &amp; CERTIFICATIONS</text:span></text:p>
      <text:p text:style-name="Standard">• <text:span text:style-name="T1">Associate of Applied Arts, Computer Animation</text:span> | The Art Institute of Dallas<text:line-break/>• <text:span text:style-name="T1">AWS Certified Developer - Associate</text:span><text:line-break/>• <text:span text:style-name="T1">Multi-Cloud Platform Certifications</text:span> (Azure, GCP)</text:p>
      <text:p text:style-name="Heading_20_3"><text:bookmark text:name="_v8vs30fvf1yo"/><text:span text:style-name="T1">RECOGNITION &amp; IMPACT</text:span></text:p>
      <text:p text:style-name="Standard">• <text:span text:style-name="T1">Webby People's Choice Award Winner</text:span> - Digital Innovation Excellence<text:line-break/>• <text:span text:style-name="T1">Solutions Organization Success:</text:span> 83% internal promotion rate across managed teams spanning 67 engineers over 8-year period, with 94% retention in customer-facing roles<text:line-break/>• <text:span text:style-name="T1">Value Engineering Impact:</text:span> Led initiatives resulting in $2.3M annual cost savings for Fortune 500 clients through quantified business case development and ROI modeling<text:line-break/>• <text:span text:style-name="T1">Technical Sales Excellence:</text:span> Pioneered solution architecture methodologies adopted organization-wide, impacting 52+ engineers across 6 product teams and contributing to $27M+ in closed deals<text:line-break/>• <text:span text:style-name="T1">Enterprise Solution Delivery:</text:span> Consistently delivered customer-facing technical solutions with 99.94% uptime and sub-92ms response times across 3 major SaaS platform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3" meta:word-count="824" meta:character-count="6489" meta:non-whitespace-character-count="5708"/>
    <meta:generator>LibreOfficeDev/6.0.5.2$Linux_X86_64 LibreOffice_project/</meta:generator>
  </office:meta>
</office:document-meta>
</file>